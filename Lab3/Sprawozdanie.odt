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79cm" table:align="left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5.203cm"/>
    </style:style>
    <style:style style:name="Table1.A1" style:family="table-cell">
      <style:table-cell-properties style:vertical-align="middle" fo:background-color="#d4ea6b" fo:padding-left="0.318cm" fo:padding-right="0.318cm" fo:padding-top="0.212cm" fo:padding-bottom="0.212cm" fo:border="0.05pt solid #c4c7c5">
        <style:background-image/>
      </style:table-cell-properties>
    </style:style>
    <style:style style:name="Table1.A2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2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2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3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3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3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4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4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4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5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5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5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6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6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6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7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7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7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8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8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8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9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9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9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10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10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10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A1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B1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e1.C1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Heading_20_1" style:list-style-name=""/>
    <style:style style:name="P2" style:family="paragraph" style:parent-style-name="Text_20_body">
      <style:text-properties officeooo:paragraph-rsid="0000d576"/>
    </style:style>
    <style:style style:name="P3" style:family="paragraph" style:parent-style-name="Text_20_body" style:list-style-name="L1">
      <style:text-properties officeooo:paragraph-rsid="0000d576"/>
    </style:style>
    <style:style style:name="P4" style:family="paragraph" style:parent-style-name="Text_20_body" style:list-style-name="L2">
      <style:text-properties officeooo:paragraph-rsid="0000d576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ext_20_body">
      <style:text-properties officeooo:paragraph-rsid="0001acfc"/>
    </style:style>
    <style:style style:name="P10" style:family="paragraph" style:parent-style-name="Text_20_body" style:list-style-name="L3">
      <style:text-properties officeooo:paragraph-rsid="0001acfc"/>
    </style:style>
    <style:style style:name="P11" style:family="paragraph" style:parent-style-name="Text_20_body" style:list-style-name="L4">
      <style:text-properties officeooo:paragraph-rsid="0001acfc"/>
    </style:style>
    <style:style style:name="P12" style:family="paragraph" style:parent-style-name="Text_20_body" style:list-style-name="L5">
      <style:text-properties officeooo:paragraph-rsid="0001acfc"/>
    </style:style>
    <style:style style:name="T1" style:family="text">
      <style:text-properties officeooo:rsid="0000d576"/>
    </style:style>
    <style:style style:name="T2" style:family="text">
      <style:text-properties style:font-name="Google Sans Text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officeooo:rsid="0001acfc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awozdanie z analizy poziomu przestępczości (Communities and Crime USA)</text:h>
      <text:h text:style-name="Heading_20_1" text:outline-level="1"><text:bookmark-start text:name="__RefHeading___Toc1_1218935047"/>Cel projektu i opis problemu<text:bookmark-end text:name="__RefHeading___Toc1_1218935047"/></text:h>
      <text:p text:style-name="Text_20_body">Celem badania było stworzenie i ewaluacja modeli regresyjnych przewidujących poziom przestępczości z użyciem przemocy (ViolentCrimesPerPop) w społecznościach na terenie USA. Analiza obejmowała również badanie korelacji cech demograficznych (struktury etnicznej) z docelową zmienną oraz porównanie skuteczności 10 różnych podejść algorytmicznych.</text:p>
      <text:h text:style-name="Heading_20_1" text:outline-level="1">Przygotowanie danych i preprocessing</text:h>
      <text:p text:style-name="P2">Zgodnie z implementacją w kodzie, proces przygotowania danych przebiegał następująco:</text:p>
      <text:list text:style-name="L1">
        <text:list-item>
          <text:p text:style-name="P3">Wczytywanie danych<text:line-break/>Nazwy kolumn pobrano z pliku tekstowego communities.names, a właściwe dane z pliku communities.data (obsługując braki danych oznaczone jako ?).</text:p>
        </text:list-item>
        <text:list-item>
          <text:p text:style-name="P3">Selekcja cech<text:line-break/>Usunięto nieistotne kolumny administracyjne i identyfikacyjne: state, county, community, communityname, fold.</text:p>
        </text:list-item>
        <text:list-item>
          <text:p text:style-name="P3">Czyszczenie danych<text:line-break/>Zastosowano SimpleImputer ze strategią mediany do uzupełnienia brakujących wartości oraz dokonano jawnej konwersji typów na wartości numeryczne.</text:p>
        </text:list-item>
        <text:list-item>
          <text:p text:style-name="P3">Skalowanie<text:line-break/>Dla algorytmów wrażliwych na odległość i optymalizację gradientową (KNN, regresja liniowa, Ridge, Voting, Stacking, Sieć neuronowa) zastosowano StandardScaler.</text:p>
        </text:list-item>
        <text:list-item>
          <text:p text:style-name="P3">Podział danych<text:line-break/>Zbiór podzielono na część treningową i testową w proporcji 80/20 przy zachowaniu stałego punktu startowego (random_state=42).</text:p>
        </text:list-item>
      </text:list>
      <text:h text:style-name="Heading_20_1" text:outline-level="1">Metodologia i testowane modele </text:h>
      <text:p text:style-name="P2">W eksperymencie sprawdzono <text:span text:style-name="T1">wiele</text:span> algorytmów uczenia maszynowego:</text:p>
      <text:list text:style-name="L2">
        <text:list-item>
          <text:p text:style-name="P4">Modele proste / liniow<text:span text:style-name="T1">e<text:line-break/></text:span>Regresja liniowa, Regresja Ridge, K-Najbliższych Sąsiadów (KNN).</text:p>
        </text:list-item>
        <text:list-item>
          <text:p text:style-name="P4">Modele drzewiaste<text:line-break/>Pojedyncze drzewo decyzyjne, Random Forest, Gradient Boosting, Bagging.</text:p>
        </text:list-item>
        <text:list-item>
          <text:p text:style-name="P4">Modele złożone<text:line-break/>Sieć neuronowa (MLP z dwiema warstwami ukrytymi: 64 i 32 neurony) oraz zespoły modeli (Ensembles).</text:p>
        </text:list-item>
      </text:list>
      <text:h text:style-name="P5" text:outline-level="1">Analiza wyników i porównanie modeli</text:h>
      <text:p text:style-name="Text_20_body">Wszystkie modele zostały ocenione na zbiorze testowym za pomocą miary RMSE (błąd średniokwadratowy). Poniższa tabela przedstawia zestawienie modeli od najlepszego (najniższe RMSE) do najgorszego:</text:p>
      <table:table table:name="Table1" table:style-name="Table1">
        <table:table-column table:style-name="Table1.A"/>
        <table:table-column table:style-name="Table1.B"/>
        <table:table-column table:style-name="Table1.A"/>
        <table:table-header-rows>
          <table:table-row>
            <table:table-cell table:style-name="Table1.A1" office:value-type="string">
              <text:p text:style-name="P6"><text:span text:style-name="Strong_20_Emphasis"><text:span text:style-name="T2">Pozycja</text:span></text:span></text:p>
            </table:table-cell>
            <table:table-cell table:style-name="Table1.A1" office:value-type="string">
              <text:p text:style-name="P6"><text:span text:style-name="Strong_20_Emphasis"><text:span text:style-name="T2">Model</text:span></text:span></text:p>
            </table:table-cell>
            <table:table-cell table:style-name="Table1.A1" office:value-type="string">
              <text:p text:style-name="P6"><text:span text:style-name="Strong_20_Emphasis"><text:span text:style-name="T2">RMSE</text:span></text:span></text:p>
            </table:table-cell>
          </table:table-row>
        </table:table-header-rows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><text:span text:style-name="T3">Voting</text:span></text:p>
          </table:table-cell>
          <table:table-cell table:style-name="Table1.C2" office:value-type="string">
            <text:p text:style-name="P7">0.1322</text:p>
          </table:table-cell>
        </table:table-row>
        <table:table-row>
          <table:table-cell table:style-name="Table1.A3" office:value-type="string">
            <text:p text:style-name="P8">2</text:p>
          </table:table-cell>
          <table:table-cell table:style-name="Table1.B3" office:value-type="string">
            <text:p text:style-name="P8">Stacking</text:p>
          </table:table-cell>
          <table:table-cell table:style-name="Table1.C3" office:value-type="string">
            <text:p text:style-name="P8">0.132<text:span text:style-name="T4">5</text:span></text:p>
          </table:table-cell>
        </table:table-row>
        <table:table-row>
          <table:table-cell table:style-name="Table1.A4" office:value-type="string">
            <text:p text:style-name="P8">3</text:p>
          </table:table-cell>
          <table:table-cell table:style-name="Table1.B4" office:value-type="string">
            <text:p text:style-name="P8">Ridge</text:p>
          </table:table-cell>
          <table:table-cell table:style-name="Table1.C4" office:value-type="string">
            <text:p text:style-name="P8">0.1345</text:p>
          </table:table-cell>
        </table:table-row>
        <table:table-row>
          <table:table-cell table:style-name="Table1.A5" office:value-type="string">
            <text:p text:style-name="P8">4</text:p>
          </table:table-cell>
          <table:table-cell table:style-name="Table1.B5" office:value-type="string">
            <text:p text:style-name="P8">Regresja liniowa</text:p>
          </table:table-cell>
          <table:table-cell table:style-name="Table1.C5" office:value-type="string">
            <text:p text:style-name="P8">0.1346</text:p>
          </table:table-cell>
        </table:table-row>
        <table:table-row>
          <table:table-cell table:style-name="Table1.A6" office:value-type="string">
            <text:p text:style-name="P8">5</text:p>
          </table:table-cell>
          <table:table-cell table:style-name="Table1.B6" office:value-type="string">
            <text:p text:style-name="P8">Random Forest</text:p>
          </table:table-cell>
          <table:table-cell table:style-name="Table1.C6" office:value-type="string">
            <text:p text:style-name="P8">0.1352</text:p>
          </table:table-cell>
        </table:table-row>
        <table:table-row>
          <table:table-cell table:style-name="Table1.A7" office:value-type="string">
            <text:p text:style-name="P8">6</text:p>
          </table:table-cell>
          <table:table-cell table:style-name="Table1.B7" office:value-type="string">
            <text:p text:style-name="P8">Bagging</text:p>
          </table:table-cell>
          <table:table-cell table:style-name="Table1.C7" office:value-type="string">
            <text:p text:style-name="P8">0.1352</text:p>
          </table:table-cell>
        </table:table-row>
        <table:table-row>
          <table:table-cell table:style-name="Table1.A8" office:value-type="string">
            <text:p text:style-name="P8">7</text:p>
          </table:table-cell>
          <table:table-cell table:style-name="Table1.B8" office:value-type="string">
            <text:p text:style-name="P8">Gradient Boosting</text:p>
          </table:table-cell>
          <table:table-cell table:style-name="Table1.C8" office:value-type="string">
            <text:p text:style-name="P8">0.1387</text:p>
          </table:table-cell>
        </table:table-row>
        <table:table-row>
          <table:table-cell table:style-name="Table1.A9" office:value-type="string">
            <text:p text:style-name="P8">8</text:p>
          </table:table-cell>
          <table:table-cell table:style-name="Table1.B9" office:value-type="string">
            <text:p text:style-name="P8">KNN</text:p>
          </table:table-cell>
          <table:table-cell table:style-name="Table1.C9" office:value-type="string">
            <text:p text:style-name="P8">0.1441</text:p>
          </table:table-cell>
        </table:table-row>
        <table:table-row>
          <table:table-cell table:style-name="Table1.A10" office:value-type="string">
            <text:p text:style-name="P8">9</text:p>
          </table:table-cell>
          <table:table-cell table:style-name="Table1.B10" office:value-type="string">
            <text:p text:style-name="P8">Sieć neuronowa (MLP)</text:p>
          </table:table-cell>
          <table:table-cell table:style-name="Table1.C10" office:value-type="string">
            <text:p text:style-name="P8">0.1611</text:p>
          </table:table-cell>
        </table:table-row>
        <table:table-row>
          <table:table-cell table:style-name="Table1.A11" office:value-type="string">
            <text:p text:style-name="P8">10</text:p>
          </table:table-cell>
          <table:table-cell table:style-name="Table1.B11" office:value-type="string">
            <text:p text:style-name="P8">Drzewo decyzyjne</text:p>
          </table:table-cell>
          <table:table-cell table:style-name="Table1.C11" office:value-type="string">
            <text:p text:style-name="P8">0.1700</text:p>
          </table:table-cell>
        </table:table-row>
      </table:table>
      <text:p text:style-name="Text_20_body"/>
      <text:p text:style-name="P9">Zgrupowany model Voting, łączący estymatory KNN, Ridge i regresji liniowej, osiągnął najlepsze parametry dopasowania:</text:p>
      <text:list text:style-name="L3">
        <text:list-item>
          <text:p text:style-name="P10">MAE (Średni błąd bezwzględny): 0.0906</text:p>
        </text:list-item>
        <text:list-item>
          <text:p text:style-name="P10">RMSE (Pierwiastek błędu średniokwadratowego): 0.1322</text:p>
        </text:list-item>
        <text:list-item>
          <text:p text:style-name="P10">R<text:span text:style-name="T5">2</text:span> (Współczynnik determinacji): 0.6350 (model wyjaśnia około 63.5% wariancji zmiennej celu)</text:p>
          <text:p text:style-name="P10"/>
        </text:list-item>
      </text:list>
      <text:h text:style-name="P5" text:outline-level="1">Analiza korelacji demograficznych</text:h>
      <text:p text:style-name="P9">W ramach analizy zbadano liniowy współczynnik korelacji Pearsona pomiędzy procentowym udziałem poszczególnych grup etnicznych w populacji społeczności a wskaźnikiem przestępczości (ViolentCrimesPerPop). Wyniki prezentują się następująco:</text:p>
      <text:list text:style-name="L4">
        <text:list-item>
          <text:p text:style-name="P11">Biali (racePctWhite): -0.68 — silna korelacja ujemna. Oznacza to, że wyższy odsetek tej grupy w danej społeczności statystycznie współwystępuje z niższym poziomem przestępczości.</text:p>
        </text:list-item>
        <text:list-item>
          <text:p text:style-name="P11">Czarni (racepctblack): 0.63 — silna korelacja dodatnia. Wyższy odsetek tej grupy w danej społeczności wiąże się ze statystycznie wyższym wskaźnikiem przestępczości w zbiorze danych.</text:p>
        </text:list-item>
        <text:list-item>
          <text:p text:style-name="P11">Latynosi (racePctHisp): 0.29 — słaba/umiarkowana korelacja dodatnia.</text:p>
        </text:list-item>
        <text:list-item>
          <text:p text:style-name="P11">Azjaci (racePctAsian): 0.04 — brak istotnej korelacji liniowej z poziomem przestępczości.</text:p>
        </text:list-item>
      </text:list>
      <text:h text:style-name="Heading_20_1" text:outline-level="1">Wnioski </text:h>
      <text:list text:style-name="L5">
        <text:list-item>
          <text:p text:style-name="P12">Najwyższą stabilność predykcji wykazują modele zespołowe (Voting) oraz klasyczne modele liniowe z regularyzacją (Ridge).</text:p>
        </text:list-item>
        <text:list-item>
          <text:p text:style-name="P12">Słaba wydajność sieci neuronowej (MLP) i pojedynczego drzewa decyzyjnego sugeruje, że domyślne parametry tych struktur wymagają tuningu hiperparametrów (np. doboru silniejszej regularyzacji lub zmiany architektury sieci), aby uniknąć przeuczenia.</text:p>
        </text:list-item>
        <text:list-item>
          <text:p text:style-name="P12">Zbiór charakteryzuje się wyraźnymi korelacjami liniowymi pomiędzy strukturą demograficzną a zmienną objaśnianą, co sprawia, że algorytmy bazujące na relacjach liniowych (Ridge/Regresja liniowa) radzą sobie w tym zadaniu bardzo dobrz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20:54:26.059888000</meta:creation-date>
    <dc:date>2026-05-21T21:13:06.564428300</dc:date>
    <meta:editing-duration>PT8M22S</meta:editing-duration>
    <meta:editing-cycles>2</meta:editing-cycles>
    <meta:generator>LibreOffice/26.2.3.2$Windows_X86_64 LibreOffice_project/70e089b17412e4cb7773e41413306b17a2328c34</meta:generator>
    <meta:document-statistic meta:table-count="1" meta:image-count="0" meta:object-count="0" meta:page-count="3" meta:paragraph-count="65" meta:word-count="496" meta:character-count="3869" meta:non-whitespace-character-count="3450"/>
  </office:meta>
</office:document-meta>
</file>